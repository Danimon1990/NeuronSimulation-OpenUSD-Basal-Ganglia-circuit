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 scenarios to try:</text:p>
      <text:p text:style-name="Standard"><text:s text:c="80"/></text:p>
      <text:p text:style-name="Standard"><text:s text:c="2"/>1. Healthy state (default) — Go pathway wins</text:p>
      <text:p text:style-name="Standard"><text:s text:c="2"/>python stimulate.py --strength 0.75 <text:s text:c="42"/></text:p>
      <text:p text:style-name="Standard"><text:s text:c="37"/></text:p>
      <text:p text:style-name="Standard"><text:s text:c="2"/>2. Parkinson's — low dopamine, movement suppressed <text:s text:c="27"/></text:p>
      <text:p text:style-name="Standard"><text:s text:c="2"/>python stimulate.py --strength 0.8 --dopamine 0.1 <text:s text:c="28"/></text:p>
      <text:p text:style-name="Standard"><text:s text:c="2"/>D1 MSN gets no dopamine boost → GPi stays high → Thalamus stays suppressed.</text:p>
      <text:p text:style-name="Standard"><text:s text:c="80"/></text:p>
      <text:p text:style-name="Standard"><text:s text:c="2"/>3. Reward burst — dopamine floods the system <text:s text:c="33"/></text:p>
      <text:p text:style-name="Standard"><text:s text:c="2"/>python stimulate.py --strength 0.6 --dopamine 0.95 <text:s text:c="27"/></text:p>
      <text:p text:style-name="Standard"><text:s text:c="2"/>D1 fires hard, D2 suppressed → GPi silenced → Thalamus fires easily. <text:s text:c="9"/></text:p>
      <text:p text:style-name="Standard"><text:s text:c="80"/></text:p>
      <text:p text:style-name="Standard"><text:s text:c="2"/>4. Dry run — preview values without writing USD <text:s text:c="30"/></text:p>
      <text:p text:style-name="Standard"><text:s text:c="2"/>python stimulate.py --strength 0.4 --dopamine 0.1 --dry-run <text:s text:c="18"/></text:p>
      <text:p text:style-name="Standard"><text:s text:c="80"/></text:p>
      <text:p text:style-name="Standard"><text:s text:c="2"/>5. Switch to circuit diagram LOD + write values <text:s text:c="30"/></text:p>
      <text:p text:style-name="Standard"><text:s text:c="2"/>python stimulate.py --strength 0.75 --lod circuit_diagram <text:s text:c="20"/></text:p>
      <text:p text:style-name="Standard"><text:s text:c="80"/></text:p>
      <text:p text:style-name="Standard"><text:s text:c="2"/>--- <text:s text:c="74"/></text:p>
      <text:p text:style-name="Standard"><text:s text:c="2"/>Important caveat: The animation.usda emissive flashes and pulse orbs are</text:p>
      <text:p text:style-name="Standard"><text:s text:c="2"/>pre-baked timeSamples — they always show the same Go-pathway sequence <text:s text:c="8"/></text:p>
      <text:p text:style-name="Standard"><text:s text:c="2"/>regardless of stimulus values. What actually changes when you run stimulate.py</text:p>
      <text:p text:style-name="Standard"><text:s text:c="3"/>is: <text:s text:c="73"/></text:p>
      <text:p text:style-name="Standard"><text:s text:c="18"/></text:p>
      <text:p text:style-name="Standard"><text:s text:c="2"/>- The neural:activationLevel float on each prim (check the Property panel in</text:p>
      <text:p text:style-name="Standard"><text:s text:c="2"/>Isaac Sim — click a neuron prim like /World/Striatum/D1_MSN and look for <text:s text:c="5"/></text:p>
      <text:p text:style-name="Standard"><text:s text:c="2"/>neural:activationLevel)</text:p>
      <text:p text:style-name="Standard"><text:s text:c="2"/>- The displayLOD variant selection (if you use --lod) <text:s text:c="24"/></text:p>
      <text:p text:style-name="Standard"><text:s text:c="80"/></text:p>
      <text:p text:style-name="Standard"><text:s text:c="2"/>After each run, do File → Reload (or close/reopen the stage) in Isaac Sim to <text:s/></text:p>
      <text:p text:style-name="Standard"><text:s text:c="2"/>pick up the new stimulus.usd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1:39:50.403754686</meta:creation-date>
    <dc:date>2026-04-03T15:27:33.223969340</dc:date>
    <meta:editing-duration>PT3H37M31S</meta:editing-duration>
    <meta:editing-cycles>1</meta:editing-cycles>
    <meta:document-statistic meta:table-count="0" meta:image-count="0" meta:object-count="0" meta:page-count="1" meta:paragraph-count="32" meta:word-count="192" meta:character-count="2248" meta:non-whitespace-character-count="1038"/>
    <meta:generator>LibreOffice/24.2.7.2$Linux_X86_64 LibreOffice_project/420$Build-2</meta:generator>
  </office:meta>
</office:document-meta>
</file>